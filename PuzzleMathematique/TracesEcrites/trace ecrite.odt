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10000030F68C8D752AE9E990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DejaVu Sans Condensed" fo:language="zxx" fo:country="none" officeooo:rsid="001c4137" officeooo:paragraph-rsid="001c4137" style:language-asian="zxx" style:country-asian="none" style:language-complex="zxx" style:country-complex="none"/>
    </style:style>
    <style:style style:name="P2" style:family="paragraph" style:parent-style-name="Title">
      <style:paragraph-properties fo:text-align="start" style:justify-single-word="false"/>
      <style:text-properties fo:font-size="16pt" fo:language="zxx" fo:country="none" officeooo:rsid="001c4137" officeooo:paragraph-rsid="001c4137" style:font-size-asian="16pt" style:language-asian="zxx" style:country-asian="none" style:font-size-complex="16pt" style:language-complex="zxx" style:country-complex="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1.6902in, 2.2417in, 0.002in, 2.2744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s problèmes difficiles en informatique</text:p>
      <text:p text:style-name="P1">Aujourd'hui, nous avons essayé de résoudre un problème très difficile à résoudre, y compris pour les ordinateur. La difficulté de ce problème est qu'on est obligé de tester un très grand nombre de possibilités de placements des pièces de puzzle, ce qui demande beaucoup de temps. </text:p>
      <text:p text:style-name="P1">On a aussi vu qu'il existe malgré tout une méthode automatisée pour trouver une solution avec le principe du <text:span text:style-name="T1">retour sur trace</text:span><text:span text:style-name="T2">, même si en pratique, l'ordinateur risque de mettre beaucoup de temps à trouver une solution avec cette technique.</text:span></text:p>
      <text:p text:style-name="P1"><draw:frame draw:style-name="fr1" draw:name="Image1" text:anchor-type="char" svg:x="4.5354in" svg:y="0.0957in" svg:width="2.3228in" svg:height="1.9598in" draw:z-index="0"><draw:image xlink:href="Pictures/10000001000004910000030F68C8D752AE9E9901.png" xlink:type="simple" xlink:show="embed" xlink:actuate="onLoad" draw:mime-type="image/png"/></draw:frame><text:span text:style-name="T2"/></text:p>
      <text:p text:style-name="P1"><text:span text:style-name="T2"/></text:p>
      <text:p text:style-name="P1"><text:span text:style-name="T2">Sur l'exemple ci-contre, on a demandé à l'ordinateur de trouver un chemin permettant de trouver la sortie du labyrinthe en partant de la flèche. Avec le retour sur trace, l'ordinateur choisit une direction au hasard lorsqu'il y en a plusieurs et revient sur ses pas dès qu'il est bloqué (par exemple au niveau des croix) pour tenter une autre direction.</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2">Les problèmes difficiles en informatique</text:p>
      <text:p text:style-name="P1">Aujourd'hui, nous avons essayé de résoudre un problème très difficile à résoudre, y compris pour les ordinateur. La difficulté de ce problème est qu'on est obligé de tester un très grand nombre de possibilités de placements des pièces de puzzle, ce qui demande beaucoup de temps. </text:p>
      <text:p text:style-name="P1">On a aussi vu qu'il existe malgré tout une méthode automatisée pour trouver une solution avec le principe du <text:span text:style-name="T1">retour sur trace</text:span><text:span text:style-name="T2">, même si en pratique, l'ordinateur risque de mettre beaucoup de temps à trouver une solution avec cette technique.</text:span></text:p>
      <text:p text:style-name="P1"><draw:frame draw:style-name="fr1" draw:name="Image1 Copy 1" text:anchor-type="char" svg:x="4.5354in" svg:y="0.0957in" svg:width="2.3228in" svg:height="1.9598in" draw:z-index="1"><draw:image xlink:href="Pictures/10000001000004910000030F68C8D752AE9E9901.png" xlink:type="simple" xlink:show="embed" xlink:actuate="onLoad" draw:mime-type="image/png"/></draw:frame><text:span text:style-name="T2"/></text:p>
      <text:p text:style-name="P1"><text:span text:style-name="T2"/></text:p>
      <text:p text:style-name="P1"><text:span text:style-name="T2">Sur l'exemple ci-contre, on a demandé à l'ordinateur de trouver un chemin permettant de trouver la sortie du labyrinthe en partant de la flèche. Avec le retour sur trace, l'ordinateur choisit une direction au hasard lorsqu'il y en a plusieurs et revient sur ses pas dès qu'il est bloqué (par exemple au niveau des croix) pour tenter une autre direc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21:58:56.307031925</meta:creation-date>
    <dc:date>2025-03-09T23:02:31.408309938</dc:date>
    <meta:editing-duration>PT3M27S</meta:editing-duration>
    <meta:editing-cycles>1</meta:editing-cycles>
    <meta:document-statistic meta:table-count="0" meta:image-count="2" meta:object-count="0" meta:page-count="1" meta:paragraph-count="8" meta:word-count="302" meta:character-count="1826" meta:non-whitespace-character-count="1530"/>
    <meta:generator>LibreOffice/7.4.7.2$Linux_X86_64 LibreOffice_project/40$Build-2</meta:generator>
  </office:meta>
</office:document-meta>
</file>